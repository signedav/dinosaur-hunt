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34D72BEC3384B37ACDF.png" manifest:media-type="image/png"/>
  <manifest:file-entry manifest:full-path="Pictures/100000010000037D000001C2B8B7B559A29FD550.png" manifest:media-type="image/png"/>
  <manifest:file-entry manifest:full-path="Pictures/1000000000000438000004228A6F939D6B1E2B45.png" manifest:media-type="image/png"/>
  <manifest:file-entry manifest:full-path="Pictures/10000001000003F200000348815D156DD3C6260A.png" manifest:media-type="image/png"/>
  <manifest:file-entry manifest:full-path="Pictures/1000000000000438000004D429CEA63C0FAFB0F0.png" manifest:media-type="image/png"/>
  <manifest:file-entry manifest:full-path="Pictures/100000010000037D000001F779ED5C337FF55267.png" manifest:media-type="image/png"/>
  <manifest:file-entry manifest:full-path="Pictures/100000010000013D0000008E6A74D171B255E81A.png" manifest:media-type="image/png"/>
  <manifest:file-entry manifest:full-path="Pictures/10000001000005B2000003664D806AAFA57ABA98.png" manifest:media-type="image/png"/>
  <manifest:file-entry manifest:full-path="Pictures/100000000000043800000347C5187999842CA6DC.png" manifest:media-type="image/png"/>
  <manifest:file-entry manifest:full-path="Pictures/1000000000000438000003499AFED66F5B853443.png" manifest:media-type="image/png"/>
  <manifest:file-entry manifest:full-path="Pictures/1000000100000278000002602F999EFA6031BD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48pt" fo:font-style="italic" officeooo:rsid="001524c6" officeooo:paragraph-rsid="001524c6" style:font-size-asian="48pt" style:font-style-asian="italic" style:font-size-complex="48pt" style:font-style-complex="italic"/>
    </style:style>
    <style:style style:name="P2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54pt" fo:font-style="italic" officeooo:paragraph-rsid="001524c6" style:font-size-asian="54pt" style:font-style-asian="italic" style:font-size-complex="54pt" style:font-style-complex="italic"/>
    </style:style>
    <style:style style:name="P3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54pt" fo:font-style="italic" officeooo:rsid="001524c6" officeooo:paragraph-rsid="001524c6" style:font-size-asian="54pt" style:font-style-asian="italic" style:font-size-complex="54pt" style:font-style-complex="italic"/>
    </style:style>
    <style:style style:name="P4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54pt" fo:font-style="italic" officeooo:rsid="001524c6" officeooo:paragraph-rsid="001524c6" style:font-size-asian="54pt" style:font-style-asian="italic" style:font-size-complex="54pt" style:font-style-complex="italic"/>
    </style:style>
    <style:style style:name="P5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54pt" fo:font-style="italic" officeooo:rsid="001524c6" officeooo:paragraph-rsid="00164d5b" style:font-size-asian="54pt" style:font-style-asian="italic" style:font-size-complex="54pt" style:font-style-complex="italic"/>
    </style:style>
    <style:style style:name="P6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54pt" fo:font-style="italic" officeooo:rsid="00164d5b" officeooo:paragraph-rsid="00164d5b" style:font-size-asian="54pt" style:font-style-asian="italic" style:font-size-complex="54pt" style:font-style-complex="italic"/>
    </style:style>
    <style:style style:name="P7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40pt" fo:font-style="italic" officeooo:rsid="001524c6" officeooo:paragraph-rsid="001524c6" style:font-size-asian="40pt" style:font-style-asian="italic" style:font-size-complex="40pt" style:font-style-complex="italic"/>
    </style:style>
    <style:style style:name="P8" style:family="paragraph" style:parent-style-name="Heading_20_1" style:master-page-name="">
      <loext:graphic-properties draw:fill="none"/>
      <style:paragraph-properties fo:margin-left="0.25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Ubuntu" fo:font-size="44pt" fo:font-style="italic" officeooo:rsid="001524c6" officeooo:paragraph-rsid="001524c6" style:font-size-asian="44pt" style:font-style-asian="italic" style:font-size-complex="44pt" style:font-style-complex="italic"/>
    </style:style>
    <style:style style:name="P9" style:family="paragraph" style:parent-style-name="Standard">
      <style:text-properties style:font-name="Ubuntu" officeooo:rsid="001386b0" officeooo:paragraph-rsid="001524c6"/>
    </style:style>
    <style:style style:name="P10" style:family="paragraph" style:parent-style-name="Standard">
      <style:text-properties style:font-name="Ubuntu" officeooo:rsid="001386b0" officeooo:paragraph-rsid="00164d5b"/>
    </style:style>
    <style:style style:name="P11" style:family="paragraph" style:parent-style-name="Standard" style:master-page-name="">
      <loext:graphic-properties draw:fill="none"/>
      <style:paragraph-properties fo:margin-left="0.3118in" fo:margin-right="0in" fo:line-height="115%" fo:text-indent="0in" style:auto-text-indent="false" style:page-number="auto" fo:background-color="transparent"/>
      <style:text-properties style:font-name="Ubuntu" fo:font-size="22pt" officeooo:rsid="0013a083" officeooo:paragraph-rsid="001524c6" style:font-size-asian="22pt" style:font-size-complex="22pt"/>
    </style:style>
    <style:style style:name="P12" style:family="paragraph" style:parent-style-name="Standard">
      <loext:graphic-properties draw:fill="none"/>
      <style:paragraph-properties fo:margin-left="0.3118in" fo:margin-right="0in" fo:line-height="115%" fo:text-indent="0in" style:auto-text-indent="false" fo:background-color="transparent"/>
      <style:text-properties style:font-name="Ubuntu" fo:font-size="22pt" officeooo:rsid="0013a083" officeooo:paragraph-rsid="001524c6" style:font-size-asian="22pt" style:font-size-complex="22pt"/>
    </style:style>
    <style:style style:name="P13" style:family="paragraph" style:parent-style-name="Standard">
      <loext:graphic-properties draw:fill="none"/>
      <style:paragraph-properties fo:margin-left="0.3118in" fo:margin-right="0in" fo:line-height="115%" fo:text-indent="0in" style:auto-text-indent="false" fo:background-color="transparent"/>
      <style:text-properties style:font-name="Ubuntu" fo:font-size="22pt" officeooo:rsid="0013a083" officeooo:paragraph-rsid="00164d5b" style:font-size-asian="22pt" style:font-size-complex="22pt"/>
    </style:style>
    <style:style style:name="P14" style:family="paragraph" style:parent-style-name="Standard" style:master-page-name="">
      <loext:graphic-properties draw:fill="none"/>
      <style:paragraph-properties fo:margin-left="0.3118in" fo:margin-right="0in" fo:line-height="115%" fo:text-indent="0in" style:auto-text-indent="false" style:page-number="auto" fo:background-color="transparent"/>
      <style:text-properties style:font-name="Ubuntu" fo:font-size="22pt" officeooo:rsid="0013a083" officeooo:paragraph-rsid="00164d5b" style:font-size-asian="22pt" style:font-size-complex="22pt"/>
    </style:style>
    <style:style style:name="P15" style:family="paragraph" style:parent-style-name="Standard" style:master-page-name="">
      <loext:graphic-properties draw:fill="none"/>
      <style:paragraph-properties fo:margin-left="0.3118in" fo:margin-right="0in" fo:line-height="115%" fo:text-indent="0in" style:auto-text-indent="false" style:page-number="auto" fo:background-color="transparent"/>
      <style:text-properties style:font-name="Ubuntu" fo:font-size="22pt" officeooo:rsid="0013a083" officeooo:paragraph-rsid="00164d5b" style:font-size-asian="22pt" style:font-size-complex="22pt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21pt" officeooo:paragraph-rsid="001524c6" style:font-size-asian="21pt" style:font-size-complex="21pt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21pt" officeooo:paragraph-rsid="001524c6" style:font-size-asian="21pt" style:font-size-complex="21pt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21pt" officeooo:paragraph-rsid="001524c6" style:font-size-asian="21pt" style:font-size-complex="21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21pt" officeooo:paragraph-rsid="00164d5b" style:font-size-asian="21pt" style:font-size-complex="21pt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21pt" officeooo:paragraph-rsid="00164d5b" style:font-size-asian="21pt" style:font-size-complex="21pt"/>
    </style:style>
    <style:style style:name="T1" style:family="text">
      <style:text-properties style:font-name="Ubuntu" officeooo:rsid="001386b0"/>
    </style:style>
    <style:style style:name="T2" style:family="text">
      <style:text-properties style:font-name="Ubuntu" officeooo:rsid="001524c6"/>
    </style:style>
    <style:style style:name="T3" style:family="text">
      <style:text-properties style:font-name="Ubuntu" officeooo:rsid="00164d5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24c6"/>
    </style:style>
    <style:style style:name="T6" style:family="text">
      <style:text-properties fo:font-variant="normal" fo:text-transform="none" style:font-name="Ubuntu" fo:letter-spacing="normal" fo:font-style="normal" fo:font-weight="normal" officeooo:rsid="001386b0"/>
    </style:style>
    <style:style style:name="T7" style:family="text">
      <style:text-properties officeooo:rsid="00164d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992in, 0.3811in, 0.4661in, 0.418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5" draw:name="Image1" text:anchor-type="char" svg:x="4.9354in" svg:y="0.0874in" svg:width="1.5102in" svg:height="1.4346in" draw:z-index="0"><draw:image xlink:href="Pictures/1000000100000278000002602F999EFA6031BD23.png" xlink:type="simple" xlink:show="embed" xlink:actuate="onLoad" draw:mime-type="image/png"/></draw:frame>Maiasaura</text:h>
      <text:p text:style-name="P16"><text:span text:style-name="T6">"Gute Mutter Echse"</text:span></text:p>
      <text:p text:style-name="P9"><draw:frame draw:style-name="fr3" draw:name="Image2" text:anchor-type="char" svg:width="6.5299in" svg:height="5.072in" draw:z-index="13"><draw:image xlink:href="Pictures/100000000000043800000347C5187999842CA6DC.png" xlink:type="simple" xlink:show="embed" xlink:actuate="onLoad" draw:mime-type="image/png"/></draw:frame></text:p>
      <text:p text:style-name="P11"><text:span text:style-name="T4">Länge</text:span><text:tab/><text:tab/><text:span text:style-name="T5">9 Meter</text:span></text:p>
      <text:p text:style-name="P12"><text:span text:style-name="T4">Gewicht</text:span><text:tab/><text:span text:style-name="T5">3500 Kilogramm</text:span></text:p>
      <text:p text:style-name="P12"><text:span text:style-name="T4">Essen</text:span><text:tab/><text:tab/><text:span text:style-name="T5">Pflanzen</text:span></text:p>
      <text:p text:style-name="P12"/>
      <text:p text:style-name="P12"><text:span text:style-name="T4">Besonderheiten</text:span></text:p>
      <text:p text:style-name="P12">- Lebte in Herden</text:p>
      <text:p text:style-name="P12">- <text:span text:style-name="T5">Orange-weisse Eier</text:span></text:p>
      <text:p text:style-name="P12"/>
      <text:h text:style-name="P7" text:outline-level="1"><draw:frame draw:style-name="fr5" draw:name="Image3" text:anchor-type="char" svg:x="4.9354in" svg:y="0.0874in" svg:width="1.5102in" svg:height="1.4346in" draw:z-index="1"><draw:image xlink:href="Pictures/1000000100000278000002602F999EFA6031BD23.png" xlink:type="simple" xlink:show="embed" xlink:actuate="onLoad" draw:mime-type="image/png"/></draw:frame>Compsognathus</text:h>
      <text:p text:style-name="P16"><text:span text:style-name="T1"/></text:p>
      <text:p text:style-name="P17"><text:span text:style-name="T1">“</text:span><text:span text:style-name="T2">Zierlicher Kiefer</text:span><text:span text:style-name="T1">”</text:span></text:p>
      <text:p text:style-name="P9"><draw:frame draw:style-name="fr4" draw:name="Image4" text:anchor-type="char" svg:width="4.3091in" svg:height="4.9311in" draw:z-index="10"><draw:image xlink:href="Pictures/1000000000000438000004D429CEA63C0FAFB0F0.png" xlink:type="simple" xlink:show="embed" xlink:actuate="onLoad" draw:mime-type="image/png"/></draw:frame></text:p>
      <text:p text:style-name="P11"><text:span text:style-name="T4">Länge</text:span><text:tab/><text:tab/><text:span text:style-name="T5">1 Meter</text:span></text:p>
      <text:p text:style-name="P12"><text:span text:style-name="T4">Gewicht</text:span><text:tab/><text:span text:style-name="T5">2 Kilogramm</text:span></text:p>
      <text:p text:style-name="P12"><text:span text:style-name="T4">Essen</text:span><text:tab/><text:tab/><text:span text:style-name="T5">Fleisch (Insekten)</text:span></text:p>
      <text:p text:style-name="P12"/>
      <text:p text:style-name="P12"><text:span text:style-name="T4">Besonderheiten</text:span></text:p>
      <text:p text:style-name="P12">- <text:span text:style-name="T5">Kleinster bekannter Saurier</text:span></text:p>
      <text:p text:style-name="P12">- <text:span text:style-name="T5">Sehr schnell</text:span></text:p>
      <text:p text:style-name="P12"/>
      <text:h text:style-name="P3" text:outline-level="1"><draw:frame draw:style-name="fr5" draw:name="Image5" text:anchor-type="char" svg:x="4.9354in" svg:y="0.0874in" svg:width="1.5102in" svg:height="1.4346in" draw:z-index="2"><draw:image xlink:href="Pictures/1000000100000278000002602F999EFA6031BD23.png" xlink:type="simple" xlink:show="embed" xlink:actuate="onLoad" draw:mime-type="image/png"/></draw:frame>Diplodocus</text:h>
      <text:p text:style-name="P16"><text:span text:style-name="T1">“</text:span><text:span text:style-name="T2">Doppelbalken</text:span><text:span text:style-name="T1">”</text:span></text:p>
      <text:p text:style-name="P9"><draw:frame draw:style-name="fr1" draw:name="Image6" text:anchor-type="char" svg:x="0.1673in" svg:y="0.0744in" svg:width="6.1953in" svg:height="5.152in" draw:z-index="14"><draw:image xlink:href="Pictures/10000001000003F200000348815D156DD3C6260A.png" xlink:type="simple" xlink:show="embed" xlink:actuate="onLoad" draw:mime-type="image/png"/></draw:frame></text:p>
      <text:p text:style-name="P11"><text:span text:style-name="T4">Länge</text:span><text:tab/><text:tab/><text:span text:style-name="T5">27 Meter</text:span></text:p>
      <text:p text:style-name="P12"><text:span text:style-name="T4">Gewicht</text:span><text:tab/><text:span text:style-name="T5">10000 Kilogramm</text:span></text:p>
      <text:p text:style-name="P12"><text:span text:style-name="T4">Essen</text:span><text:tab/><text:tab/><text:span text:style-name="T5">Pflanzen</text:span></text:p>
      <text:p text:style-name="P12"/>
      <text:p text:style-name="P12"><text:span text:style-name="T4">Besonderheiten</text:span></text:p>
      <text:p text:style-name="P12">- <text:span text:style-name="T5">Längster Dinosaurier</text:span></text:p>
      <text:p text:style-name="P12">- <text:span text:style-name="T5">Ass Steine</text:span></text:p>
      <text:h text:style-name="P2" text:outline-level="1">Triceratops<draw:frame draw:style-name="fr5" draw:name="Image7" text:anchor-type="char" svg:x="4.9354in" svg:y="0.0874in" svg:width="1.5102in" svg:height="1.4346in" draw:z-index="3"><draw:image xlink:href="Pictures/1000000100000278000002602F999EFA6031BD23.png" xlink:type="simple" xlink:show="embed" xlink:actuate="onLoad" draw:mime-type="image/png"/></draw:frame></text:h>
      <text:p text:style-name="P16"><text:span text:style-name="T1">“Dreihorn-Gesicht”</text:span></text:p>
      <text:p text:style-name="P9"><draw:frame draw:style-name="fr6" draw:name="Image8" text:anchor-type="char" svg:x="0.4165in" svg:y="0.0744in" svg:width="5.6311in" svg:height="4.3846in" draw:z-index="4"><draw:image xlink:href="Pictures/1000000000000438000003499AFED66F5B853443.png" xlink:type="simple" xlink:show="embed" xlink:actuate="onLoad" draw:mime-type="image/png"/></draw:frame></text:p>
      <text:p text:style-name="P11"><text:span text:style-name="T4">Länge</text:span><text:tab/><text:tab/><text:span text:style-name="T5">9 Meter</text:span></text:p>
      <text:p text:style-name="P12"><text:span text:style-name="T4">Gewicht</text:span><text:tab/><text:span text:style-name="T5">10000 Kilogramm</text:span></text:p>
      <text:p text:style-name="P12"><text:span text:style-name="T4">Essen</text:span><text:tab/><text:tab/><text:span text:style-name="T5">Pflanzen</text:span></text:p>
      <text:p text:style-name="P12"/>
      <text:p text:style-name="P12"><text:span text:style-name="T4">Besonderheiten</text:span></text:p>
      <text:p text:style-name="P12">- Verteidigt sich mit den Hörnern</text:p>
      <text:p text:style-name="P12">- <text:span text:style-name="T5">Zerkleinert harte Pflanzen mit Schnabel</text:span></text:p>
      <text:p text:style-name="P12"/>
      <text:h text:style-name="P1" text:outline-level="1"><draw:frame draw:style-name="fr5" draw:name="Image9" text:anchor-type="char" svg:x="4.9354in" svg:y="0.0874in" svg:width="1.5102in" svg:height="1.4346in" draw:z-index="5"><draw:image xlink:href="Pictures/1000000100000278000002602F999EFA6031BD23.png" xlink:type="simple" xlink:show="embed" xlink:actuate="onLoad" draw:mime-type="image/png"/></draw:frame>Ichthyosaurus</text:h>
      <text:p text:style-name="P16"><text:span text:style-name="T1">“</text:span><text:span text:style-name="T2">Fisch-Echse</text:span><text:span text:style-name="T1">”</text:span></text:p>
      <text:p text:style-name="P17"><text:span text:style-name="T1"/></text:p>
      <text:p text:style-name="P9"><draw:frame draw:style-name="fr2" draw:name="Image10" text:anchor-type="char" svg:width="4.4626in" svg:height="2.6626in" draw:z-index="15"><draw:image xlink:href="Pictures/10000001000005B2000003664D806AAFA57ABA98.png" xlink:type="simple" xlink:show="embed" xlink:actuate="onLoad" draw:mime-type="image/png"/></draw:frame></text:p>
      <text:p text:style-name="P11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1" draw:name="Image17" text:anchor-type="char" svg:x="0.7429in" svg:y="0.0535in" svg:width="4.8091in" svg:height="2.2362in" draw:z-index="16"><draw:image xlink:href="Pictures/100000010000013D0000008E6A74D171B255E81A.png" xlink:type="simple" xlink:show="embed" xlink:actuate="onLoad" draw:mime-type="image/png"/></draw:frame><text:span text:style-name="T4"><text:line-break/>Länge</text:span><text:tab/><text:tab/><text:span text:style-name="T5">4 Meter</text:span></text:p>
      <text:p text:style-name="P12"><text:span text:style-name="T4">Gewicht</text:span><text:tab/><text:span text:style-name="T5">1000 Kilogramm</text:span></text:p>
      <text:p text:style-name="P12"><text:span text:style-name="T4">Essen</text:span><text:tab/><text:tab/><text:span text:style-name="T5">Fische, Tintenfische</text:span></text:p>
      <text:p text:style-name="P12"/>
      <text:p text:style-name="P12"><text:span text:style-name="T4">Besonderheiten</text:span></text:p>
      <text:p text:style-name="P12">- <text:span text:style-name="T5">Ähnelt einem Delfin</text:span></text:p>
      <text:p text:style-name="P12">- <text:span text:style-name="T5">Kann im Dunkeln sehen</text:span></text:p>
      <text:p text:style-name="P12"/>
      <text:h text:style-name="P8" text:outline-level="1"><draw:frame draw:style-name="fr5" draw:name="Image11" text:anchor-type="char" svg:x="4.9354in" svg:y="0.0874in" svg:width="1.5102in" svg:height="1.4346in" draw:z-index="6"><draw:image xlink:href="Pictures/1000000100000278000002602F999EFA6031BD23.png" xlink:type="simple" xlink:show="embed" xlink:actuate="onLoad" draw:mime-type="image/png"/></draw:frame>Quetzalcoatius</text:h>
      <text:p text:style-name="P16"><text:span text:style-name="T2">(Aztekischer Name)</text:span></text:p>
      <text:p text:style-name="P17"><text:span text:style-name="T1"/></text:p>
      <text:p text:style-name="P9"><draw:frame draw:style-name="fr6" draw:name="Image12" text:anchor-type="char" svg:x="1.2638in" svg:y="0.0744in" svg:width="3.3835in" svg:height="2.6339in" draw:z-index="7"><draw:image xlink:href="Pictures/100000010000037D000001F779ED5C337FF55267.png" xlink:type="simple" xlink:show="embed" xlink:actuate="onLoad" draw:mime-type="image/png"/></draw:frame><draw:frame draw:style-name="fr1" draw:name="Image18" text:anchor-type="char" svg:x="0.611in" svg:y="2.7244in" svg:width="5.2583in" svg:height="2.6492in" draw:z-index="17"><draw:image xlink:href="Pictures/100000010000037D000001C2B8B7B559A29FD550.png" xlink:type="simple" xlink:show="embed" xlink:actuate="onLoad" draw:mime-type="image/png"/></draw:frame></text:p>
      <text:p text:style-name="P11"><text:span text:style-name="T4">Länge</text:span><text:tab/><text:tab/><text:span text:style-name="T5">12 Meter (Flügel)</text:span></text:p>
      <text:p text:style-name="P12"><text:span text:style-name="T4">Gewicht</text:span><text:tab/><text:span text:style-name="T5">250 Kilogramm</text:span></text:p>
      <text:p text:style-name="P12"><text:span text:style-name="T4">Essen</text:span><text:tab/><text:tab/><text:span text:style-name="T5">Kleine Tiere</text:span></text:p>
      <text:p text:style-name="P12"><text:span text:style-name="T4">Besonderheiten</text:span></text:p>
      <text:p text:style-name="P12">- <text:span text:style-name="T5">Grösstes flugfähiges Tier</text:span></text:p>
      <text:p text:style-name="P12">- <text:span text:style-name="T7">Kann</text:span><text:span text:style-name="T5"> </text:span><text:span text:style-name="T7">auf Flügel </text:span><text:span text:style-name="T5">gehen</text:span></text:p>
      <text:h text:style-name="P5" text:outline-level="1"><draw:frame draw:style-name="fr5" draw:name="Image13" text:anchor-type="char" svg:x="4.9354in" svg:y="0.0874in" svg:width="1.5102in" svg:height="1.4346in" draw:z-index="8"><draw:image xlink:href="Pictures/1000000100000278000002602F999EFA6031BD23.png" xlink:type="simple" xlink:show="embed" xlink:actuate="onLoad" draw:mime-type="image/png"/></draw:frame>Velociraptor</text:h>
      <text:p text:style-name="P19"><text:span text:style-name="T1">“</text:span><text:span text:style-name="T3">Schneller Räuber</text:span><text:span text:style-name="T1">”</text:span></text:p>
      <text:p text:style-name="P10"><draw:frame draw:style-name="fr1" draw:name="Image14" text:anchor-type="char" svg:x="0in" svg:y="0.0602in" svg:width="6.5299in" svg:height="4.9354in" draw:z-index="12"><draw:image xlink:href="Pictures/10000000000004380000034D72BEC3384B37ACDF.png" xlink:type="simple" xlink:show="embed" xlink:actuate="onLoad" draw:mime-type="image/png"/></draw:frame></text:p>
      <text:p text:style-name="P14"><text:span text:style-name="T4">Länge</text:span><text:tab/><text:tab/><text:span text:style-name="T7">2 Meter</text:span></text:p>
      <text:p text:style-name="P13"><text:span text:style-name="T4">Gewicht</text:span><text:tab/><text:span text:style-name="T7">20 Kilogramm</text:span></text:p>
      <text:p text:style-name="P13"><text:span text:style-name="T4">Essen</text:span><text:tab/><text:tab/><text:span text:style-name="T7">Fleisch</text:span></text:p>
      <text:p text:style-name="P13"/>
      <text:p text:style-name="P13"><text:span text:style-name="T4">Besonderheiten</text:span></text:p>
      <text:p text:style-name="P13">- <text:span text:style-name="T7">Sehr schlau</text:span></text:p>
      <text:p text:style-name="P13">- <text:span text:style-name="T7">Jagt in Gruppen</text:span></text:p>
      <text:p text:style-name="P13"/>
      <text:h text:style-name="P6" text:outline-level="1"><draw:frame draw:style-name="fr5" draw:name="Image15" text:anchor-type="char" svg:x="4.9354in" svg:y="0.0874in" svg:width="1.5102in" svg:height="1.4346in" draw:z-index="9"><draw:image xlink:href="Pictures/1000000100000278000002602F999EFA6031BD23.png" xlink:type="simple" xlink:show="embed" xlink:actuate="onLoad" draw:mime-type="image/png"/></draw:frame>Oviraptor</text:h>
      <text:p text:style-name="P19"><text:span text:style-name="T1">“</text:span><text:span text:style-name="T3">Eierdieb</text:span><text:span text:style-name="T1">”</text:span></text:p>
      <text:p text:style-name="P10"><draw:frame draw:style-name="fr1" draw:name="Image16" text:anchor-type="char" svg:x="0.7083in" svg:y="0.1736in" svg:width="5.1126in" svg:height="5.0083in" draw:z-index="11"><draw:image xlink:href="Pictures/1000000000000438000004228A6F939D6B1E2B45.png" xlink:type="simple" xlink:show="embed" xlink:actuate="onLoad" draw:mime-type="image/png"/></draw:frame></text:p>
      <text:p text:style-name="P14"><text:span text:style-name="T4">Länge</text:span><text:tab/><text:tab/><text:span text:style-name="T7">2 Meter</text:span></text:p>
      <text:p text:style-name="P13"><text:span text:style-name="T4">Gewicht</text:span><text:tab/><text:span text:style-name="T7">25 Kilogramm</text:span></text:p>
      <text:p text:style-name="P13"><text:span text:style-name="T4">Essen</text:span><text:tab/><text:tab/><text:span text:style-name="T7">Eier, Früchte</text:span></text:p>
      <text:p text:style-name="P13"/>
      <text:p text:style-name="P13"><text:span text:style-name="T4">Besonderheiten</text:span></text:p>
      <text:p text:style-name="P13">- <text:span text:style-name="T7">Mag den Wald</text:span></text:p>
      <text:p text:style-name="P13">- <text:span text:style-name="T7">Stielt E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4.51pt dashe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2:42:15.978569683</meta:creation-date>
    <meta:editing-duration>PT8M49S</meta:editing-duration>
    <meta:editing-cycles>3</meta:editing-cycles>
    <meta:generator>LibreOffice/7.3.7.2$Linux_X86_64 LibreOffice_project/30$Build-2</meta:generator>
    <meta:print-date>2025-06-08T22:49:39.890108543</meta:print-date>
    <dc:date>2025-06-08T23:55:05.937339515</dc:date>
    <meta:document-statistic meta:table-count="0" meta:image-count="18" meta:object-count="0" meta:page-count="8" meta:paragraph-count="64" meta:word-count="162" meta:character-count="1115" meta:non-whitespace-character-count="1000"/>
  </office:meta>
</office:document-meta>
</file>