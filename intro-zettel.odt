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40000008A1F6F2F9EDCEBF5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 Black" fo:font-size="40pt" officeooo:rsid="0002373f" officeooo:paragraph-rsid="0002373f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Lato Black" fo:font-size="48pt" officeooo:rsid="0002373f" officeooo:paragraph-rsid="00047f92" style:font-size-asian="48pt" style:font-size-complex="48pt"/>
    </style:style>
    <style:style style:name="T1" style:family="text">
      <style:text-properties officeooo:rsid="00040891"/>
    </style:style>
    <style:style style:name="T2" style:family="text">
      <style:text-properties officeooo:rsid="00047f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Wer </text:span><text:span text:style-name="T2">bekommt den</text:span><text:span text:style-name="T1"> offiziellen </text:span>Anhänger für </text:p>
      <text:p text:style-name="P2">Jung-Paläontologinnen?</text:p>
      <text:p text:style-name="P1"/>
      <text:p text:style-name="P1"/>
      <text:p text:style-name="P1"><draw:frame draw:style-name="fr1" draw:name="Image1" text:anchor-type="char" svg:x="3.198in" svg:y="0.2902in" svg:width="3.5217in" svg:height="2.4791in" draw:z-index="0"><draw:image xlink:href="Pictures/10000001000000C40000008A1F6F2F9EDCEBF5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fo:border-top="4.51pt dashed #000000" fo:border-bottom="4.51pt dashed #000000" fo:border-left="none" fo:border-right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23:55:45.173233209</meta:creation-date>
    <dc:date>2025-06-09T21:29:14.735130055</dc:date>
    <meta:editing-duration>PT1H12M39S</meta:editing-duration>
    <meta:editing-cycles>3</meta:editing-cycles>
    <meta:generator>LibreOffice/7.3.7.2$Linux_X86_64 LibreOffice_project/30$Build-2</meta:generator>
    <meta:print-date>2025-06-09T21:27:32.997458018</meta:print-date>
    <meta:document-statistic meta:table-count="0" meta:image-count="1" meta:object-count="0" meta:page-count="1" meta:paragraph-count="2" meta:word-count="7" meta:character-count="63" meta:non-whitespace-character-count="57"/>
  </office:meta>
</office:document-meta>
</file>