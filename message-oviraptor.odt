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2994E6F86A7C599C4DB.png" manifest:media-type="image/png"/>
  <manifest:file-entry manifest:full-path="Pictures/10000001000001690000016F89965DF5DC093A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text-properties style:font-name="Purisa" fo:font-size="36pt" officeooo:rsid="0012bd3a" officeooo:paragraph-rsid="0012bd3a" style:font-size-asian="36pt" style:font-size-complex="36pt"/>
    </style:style>
    <style:style style:name="P2" style:family="paragraph" style:parent-style-name="Standard">
      <style:text-properties style:font-name="Purisa" fo:font-size="36pt" fo:font-weight="normal" officeooo:rsid="0012bd3a" officeooo:paragraph-rsid="0012bd3a" style:font-size-asian="36pt" style:font-weight-asian="normal" style:font-size-complex="3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4.6311in" svg:y="-0.1654in" svg:width="1.7209in" svg:height="1.7492in" draw:z-index="1"><draw:image xlink:href="Pictures/10000001000001690000016F89965DF5DC093A55.png" xlink:type="simple" xlink:show="embed" xlink:actuate="onLoad" draw:mime-type="image/png"/></draw:frame>ZU SPÄT!</text:p>
      <text:p text:style-name="P1">ICH BIN IN <text:span text:style-name="T1">SÜDÖSTLICHE </text:span><text:span text:style-name="T2">RICHTUNG </text:span><draw:frame draw:style-name="fr1" draw:name="Image1" text:anchor-type="char" svg:x="0.0417in" svg:y="2.6346in" svg:width="6.6929in" svg:height="5.0752in" draw:z-index="0"><draw:image xlink:href="Pictures/100000010000036D000002994E6F86A7C599C4DB.png" xlink:type="simple" xlink:show="embed" xlink:actuate="onLoad" draw:mime-type="image/png"/></draw:frame><text:span text:style-name="T2">GEFLOHEN.</text:span></text:p>
      <text:p text:style-name="P2">MJAM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0:04:44.632631569</meta:creation-date>
    <dc:date>2025-06-09T00:09:30.733360968</dc:date>
    <meta:editing-duration>PT4M46S</meta:editing-duration>
    <meta:editing-cycles>1</meta:editing-cycles>
    <meta:document-statistic meta:table-count="0" meta:image-count="2" meta:object-count="0" meta:page-count="1" meta:paragraph-count="3" meta:word-count="9" meta:character-count="54" meta:non-whitespace-character-count="48"/>
    <meta:generator>LibreOffice/7.3.7.2$Linux_X86_64 LibreOffice_project/30$Build-2</meta:generator>
  </office:meta>
</office:document-meta>
</file>