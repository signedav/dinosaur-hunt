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50000015BF973E56F5F1D3E67.png" manifest:media-type="image/png"/>
  <manifest:file-entry manifest:full-path="Pictures/100000010000025E00000250C0B58AE0A3F2F5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roob" svg:font-family="Uroob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roob" fo:font-size="96pt" officeooo:rsid="000129fe" officeooo:paragraph-rsid="000129fe" style:font-size-asian="96pt" style:font-size-complex="9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HTUNG</text:p>
      <text:p text:style-name="P1"><draw:frame draw:style-name="fr1" draw:name="Image2" text:anchor-type="char" svg:x="0.0598in" svg:y="0.5429in" svg:width="2.3681in" svg:height="2.3134in" draw:z-index="1"><draw:image xlink:href="Pictures/100000010000025E00000250C0B58AE0A3F2F50F.png" xlink:type="simple" xlink:show="embed" xlink:actuate="onLoad" draw:mime-type="image/png"/></draw:frame><draw:frame draw:style-name="fr1" draw:name="Image1" text:anchor-type="char" svg:x="1.5346in" svg:y="0.111in" svg:width="6.9764in" svg:height="3.8744in" draw:z-index="0"><draw:image xlink:href="Pictures/10000001000002150000015BF973E56F5F1D3E67.png" xlink:type="simple" xlink:show="embed" xlink:actuate="onLoad" draw:mime-type="image/png"/></draw:frame><draw:frame draw:style-name="fr1" draw:name="Image3" text:anchor-type="char" svg:x="7.6291in" svg:y="0.6126in" svg:width="2.3681in" svg:height="2.3134in" draw:z-index="2"><draw:image xlink:href="Pictures/100000010000025E00000250C0B58AE0A3F2F50F.png" xlink:type="simple" xlink:show="embed" xlink:actuate="onLoad" draw:mime-type="image/png"/></draw:frame></text:p>
      <text:p text:style-name="P1"/>
      <text:p text:style-name="P1"/>
      <text:p text:style-name="P1">NISTPLATZ MAIASAUR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roob" svg:font-family="Uroob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8T23:55:45.173233209</meta:creation-date>
    <dc:date>2025-06-09T22:09:44.519296698</dc:date>
    <meta:editing-duration>PT11M14S</meta:editing-duration>
    <meta:editing-cycles>2</meta:editing-cycles>
    <meta:generator>LibreOffice/7.3.7.2$Linux_X86_64 LibreOffice_project/30$Build-2</meta:generator>
    <meta:print-date>2025-06-09T22:07:30.594626742</meta:print-date>
    <meta:document-statistic meta:table-count="0" meta:image-count="3" meta:object-count="0" meta:page-count="1" meta:paragraph-count="2" meta:word-count="3" meta:character-count="26" meta:non-whitespace-character-count="25"/>
  </office:meta>
</office:document-meta>
</file>